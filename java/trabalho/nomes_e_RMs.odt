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690" officeooo:paragraph-rsid="001666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ilo Macedo Silva 566462<text:line-break/>Lucas Lopes Rodrigues 56354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8:46:32.739446583</meta:creation-date>
    <dc:date>2026-03-20T18:48:19.700550698</dc:date>
    <meta:editing-duration>PT1M48S</meta:editing-duration>
    <meta:editing-cycles>1</meta:editing-cycles>
    <meta:document-statistic meta:table-count="0" meta:image-count="0" meta:object-count="0" meta:page-count="1" meta:paragraph-count="1" meta:word-count="8" meta:character-count="55" meta:non-whitespace-character-count="48"/>
    <meta:generator>LibreOffice/25.8.5.2$Linux_X86_64 LibreOffice_project/580$Build-2</meta:generator>
  </office:meta>
</office:document-meta>
</file>